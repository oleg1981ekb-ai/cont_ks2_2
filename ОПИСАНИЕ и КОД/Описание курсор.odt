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style:font-name="Liberation Mono"/>
    </style:style>
    <style:style style:name="T2" style:family="text">
      <style:text-properties fo:font-weight="bold"/>
    </style:style>
    <style:style style:name="T3" style:family="text">
      <style:text-properties style:font-name="Liberation Mono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троительный трекер <text:span text:style-name="T1">cont_ks2_2</text:span></text:h>
      <text:h text:style-name="Heading_20_2" text:outline-level="2">Какую задачу решает приложение</text:h>
      <text:p text:style-name="Text_20_body">Это <text:span text:style-name="T2">CLI-система контроля строительной исполнительной документации</text:span> — актов КС-2, справок КС-3, счетов, счетов-фактур и исполнительной документации по строительным объектам.</text:p>
      <text:p text:style-name="Text_20_body">Пользователь ведёт иерархию:</text:p>
      <text:p text:style-name="Text_20_body"><text:span text:style-name="T2">Направление → Подобъект → Месяц</text:span></text:p>
      <text:p text:style-name="Text_20_body">Для каждого месяца хранятся:</text:p>
      <text:list text:style-name="L1">
        <text:list-item>
          <text:p text:style-name="P1"><text:span text:style-name="T2">сумма</text:span> бюджета периода (с копейками),</text:p>
        </text:list-item>
        <text:list-item>
          <text:p text:style-name="P1"><text:span text:style-name="T2">статус СтрК</text:span> (1 — зелёный, 2 — жёлтый, 3 — красный) — общий или по каждому документу отдельно,</text:p>
        </text:list-item>
        <text:list-item>
          <text:p text:style-name="P1"><text:span text:style-name="T2">дата</text:span> последнего изменения статуса.</text:p>
        </text:list-item>
      </text:list>
      <text:p text:style-name="Text_20_body">Из этих данных генерируется Excel-отчёт <text:span text:style-name="T1">Трекер_Акт_Выполнения.xlsx</text:span> с 5-уровневой outline-структурой (направление → подобъект → месяц → документы → лог даты). Изменения можно выгружать в GitHub с версионированием.</text:p>
      <text:p text:style-name="Text_20_body">Точка входа для интерактивной работы — <text:span text:style-name="T3">wizard_manager.py</text:span>.</text:p>
      <text:p text:style-name="Horizontal_20_Line"/>
      <text:h text:style-name="Heading_20_2" text:outline-level="2">Архитектура</text:h>
      <text:p text:style-name="P2">flowchart TB<text:line-break/> <text:s text:c="3"/>subgraph UI["Слой интерфейса (wizard_*)"]<text:line-break/> <text:s text:c="7"/>WM[wizard_manager.py]<text:line-break/> <text:s text:c="7"/>WMenu[wizard_menus.py]<text:line-break/> <text:s text:c="7"/>WEdit[wizard_edits.py]<text:line-break/> <text:s text:c="7"/>WGit[wizard_git.py]<text:line-break/> <text:s text:c="7"/>DV[db_viewer.py]<text:line-break/> <text:s text:c="3"/>end<text:line-break/><text:line-break/> <text:s text:c="3"/>subgraph Data["Слой данных"]<text:line-break/> <text:s text:c="7"/>DC[db_core.py]<text:line-break/> <text:s text:c="7"/>DB[(database.json)]<text:line-break/> <text:s text:c="7"/>CFG[config.py]<text:line-break/> <text:s text:c="3"/>end<text:line-break/><text:line-break/> <text:s text:c="3"/>subgraph Report["Генерация отчёта"]<text:line-break/> <text:s text:c="7"/>B[builder.py]<text:line-break/> <text:s text:c="7"/>ES[excel_styler.py]<text:line-break/> <text:s text:c="7"/>XLS[Трекер_Акт_Выполнения.xlsx]<text:line-break/> <text:s text:c="3"/>end<text:line-break/><text:line-break/> <text:s text:c="3"/>WM --&gt; WMenu &amp; WEdit &amp; DV &amp; B &amp; WGit<text:line-break/> <text:s text:c="3"/>WMenu --&gt; DC<text:line-break/> <text:s text:c="3"/>WEdit --&gt; DC &amp; WGit<text:line-break/> <text:s text:c="3"/>DV --&gt; DC<text:line-break/> <text:s text:c="3"/>DC --&gt; DB<text:line-break/> <text:s text:c="3"/>DC --&gt; CFG<text:line-break/><text:soft-page-break/> <text:s text:c="3"/>B --&gt; DB &amp; DC &amp; ES &amp; CFG<text:line-break/> <text:s text:c="3"/>B --&gt; XLS<text:line-break/> <text:s text:c="3"/>WGit --&gt; CFG</text:p>
      <table:table table:name="Таблица1" table:style-name="Таблица1">
        <table:table-column table:style-name="Таблица1.A" table:number-columns-repeated="3"/>
        <table:table-header-rows>
          <table:table-row>
            <table:table-cell table:style-name="Таблица1.A1" office:value-type="string">
              <text:p text:style-name="P3">Слой</text:p>
            </table:table-cell>
            <table:table-cell table:style-name="Таблица1.A1" office:value-type="string">
              <text:p text:style-name="P3">Файлы</text:p>
            </table:table-cell>
            <table:table-cell table:style-name="Таблица1.C1" office:value-type="string">
              <text:p text:style-name="P3">Роль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<text:span text:style-name="T2">Данные</text:span></text:p>
          </table:table-cell>
          <table:table-cell table:style-name="Таблица1.A2" office:value-type="string">
            <text:p text:style-name="Table_20_Contents"><text:span text:style-name="T1">database.json</text:span>, <text:span text:style-name="T1">db_core.py</text:span></text:p>
          </table:table-cell>
          <table:table-cell table:style-name="Таблица1.C2" office:value-type="string">
            <text:p text:style-name="P4">Единый источник правды (JSON-дерево), load/save, форматирование сумм, хронология месяцев</text:p>
          </table:table-cell>
        </table:table-row>
        <table:table-row>
          <table:table-cell table:style-name="Таблица1.A2" office:value-type="string">
            <text:p text:style-name="Table_20_Contents"><text:span text:style-name="T2">Конфигурация</text:span></text:p>
          </table:table-cell>
          <table:table-cell table:style-name="Таблица1.A2" office:value-type="string">
            <text:p text:style-name="Table_20_Contents"><text:span text:style-name="T1">config.py</text:span></text:p>
          </table:table-cell>
          <table:table-cell table:style-name="Таблица1.C2" office:value-type="string">
            <text:p text:style-name="P4">Заголовки колонок, список документов, маски доступа по колонкам, палитра стилей, версия</text:p>
          </table:table-cell>
        </table:table-row>
        <table:table-row>
          <table:table-cell table:style-name="Таблица1.A2" office:value-type="string">
            <text:p text:style-name="Table_20_Contents"><text:span text:style-name="T2">UI (wizard)</text:span></text:p>
          </table:table-cell>
          <table:table-cell table:style-name="Таблица1.A2" office:value-type="string">
            <text:p text:style-name="Table_20_Contents"><text:span text:style-name="T1">wizard_manager.py</text:span>, <text:span text:style-name="T1">wizard_menus.py</text:span>, <text:span text:style-name="T1">wizard_edits.py</text:span>, <text:span text:style-name="T1">wizard_git.py</text:span></text:p>
          </table:table-cell>
          <table:table-cell table:style-name="Таблица1.C2" office:value-type="string">
            <text:p text:style-name="P4">Консольное меню: просмотр, добавление, редактирование, генерация + Git</text:p>
          </table:table-cell>
        </table:table-row>
        <table:table-row>
          <table:table-cell table:style-name="Таблица1.A2" office:value-type="string">
            <text:p text:style-name="Table_20_Contents"><text:span text:style-name="T2">Отчёт</text:span></text:p>
          </table:table-cell>
          <table:table-cell table:style-name="Таблица1.A2" office:value-type="string">
            <text:p text:style-name="Table_20_Contents"><text:span text:style-name="T1">builder.py</text:span>, <text:span text:style-name="T1">excel_styler.py</text:span></text:p>
          </table:table-cell>
          <table:table-cell table:style-name="Таблица1.C2" office:value-type="string">
            <text:p text:style-name="P4">Сборка Excel из JSON, стили, outline, блокировка ячеек по маскам</text:p>
          </table:table-cell>
        </table:table-row>
        <table:table-row>
          <table:table-cell table:style-name="Таблица1.A2" office:value-type="string">
            <text:p text:style-name="Table_20_Contents"><text:span text:style-name="T2">Просмотр</text:span></text:p>
          </table:table-cell>
          <table:table-cell table:style-name="Таблица1.A2" office:value-type="string">
            <text:p text:style-name="Table_20_Contents"><text:span text:style-name="T1">db_viewer.py</text:span></text:p>
          </table:table-cell>
          <table:table-cell table:style-name="Таблица1.C2" office:value-type="string">
            <text:p text:style-name="P4">Текстовое дерево базы в консоли</text:p>
          </table:table-cell>
        </table:table-row>
        <table:table-row>
          <table:table-cell table:style-name="Таблица1.A2" office:value-type="string">
            <text:p text:style-name="Table_20_Contents"><text:span text:style-name="T2">Legacy</text:span></text:p>
          </table:table-cell>
          <table:table-cell table:style-name="Таблица1.A2" office:value-type="string">
            <text:p text:style-name="Table_20_Contents"><text:span text:style-name="T1">main.py</text:span>, <text:span text:style-name="T1">storage.py</text:span>, <text:span text:style-name="T1">formatter.py</text:span></text:p>
          </table:table-cell>
          <table:table-cell table:style-name="Таблица1.C2" office:value-type="string">
            <text:p text:style-name="Table_20_Contents">Старый путь: сборка из <text:span text:style-name="T1">config.DATA_ROWS</text:span> + миграция данных из старого Excel</text:p>
          </table:table-cell>
        </table:table-row>
      </table:table>
      <text:p text:style-name="Text_20_body"/>
      <text:p text:style-name="Text_20_body">Проект следует принципу <text:span text:style-name="T2">Single Source of Truth</text:span>: Excel не хранит данные, а только отображает содержимое <text:span text:style-name="T1">database.json</text:span>.</text:p>
      <text:p text:style-name="Horizontal_20_Line"/>
      <text:h text:style-name="Heading_20_2" text:outline-level="2">Структура <text:span text:style-name="T1">database.json</text:span></text:h>
      <text:p text:style-name="P2">"01_АНАПА (Таманская)": {<text:line-break/> <text:s text:c="3"/>"01_271_КН": {<text:line-break/> <text:s text:c="7"/>"Июнь": {<text:line-break/> <text:s text:c="11"/>"sum": 17730436.92,<text:line-break/> <text:s text:c="11"/>"status": {<text:line-break/> <text:s text:c="15"/>"Акт КС-2": {"value": 2, "date": "02.07"},<text:line-break/> <text:s text:c="15"/>"Справка КС-3": {"value": 2, "date": "02.07"}<text:line-break/> <text:s text:c="11"/>}<text:line-break/> <text:s text:c="7"/>}<text:line-break/> <text:s text:c="3"/>}<text:line-break/>}</text:p>
      <text:p text:style-name="Text_20_body">Поле <text:span text:style-name="T1">status</text:span> может быть:</text:p>
      <text:list text:style-name="L2">
        <text:list-item>
          <text:p text:style-name="P5">пустой строкой,</text:p>
        </text:list-item>
        <text:list-item>
          <text:p text:style-name="P5">объектом <text:span text:style-name="T1">{"value": 3, "date": "01.07"}</text:span> — один статус на все документы,</text:p>
        </text:list-item>
        <text:list-item>
          <text:p text:style-name="P5"><text:soft-page-break/>словарём по именам документов — раздельные статусы.</text:p>
        </text:list-item>
      </text:list>
      <text:p text:style-name="Horizontal_20_Line"/>
      <text:h text:style-name="Heading_20_2" text:outline-level="2">Модуль <text:span text:style-name="T1">db_core.py</text:span></text:h>
      <text:p text:style-name="Text_20_body">Техническое ядро базы данных:</text:p>
      <table:table table:name="Таблица2" table:style-name="Таблица2">
        <table:table-column table:style-name="Таблица2.A" table:number-columns-repeated="2"/>
        <table:table-header-rows>
          <table:table-row>
            <table:table-cell table:style-name="Таблица2.A1" office:value-type="string">
              <text:p text:style-name="P3">Функция</text:p>
            </table:table-cell>
            <table:table-cell table:style-name="Таблица2.B1" office:value-type="string">
              <text:p text:style-name="P3">Назначение</text:p>
            </table:table-cell>
          </table:table-row>
        </table:table-header-rows>
        <table:table-row>
          <table:table-cell table:style-name="Таблица2.A2" office:value-type="string">
            <text:p text:style-name="Table_20_Contents"><text:span text:style-name="T1">load_db()</text:span> / <text:span text:style-name="T1">save_db()</text:span></text:p>
          </table:table-cell>
          <table:table-cell table:style-name="Таблица2.B2" office:value-type="string">
            <text:p text:style-name="Table_20_Contents">Чтение/запись <text:span text:style-name="T1">database.json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1">fmt_money()</text:span></text:p>
          </table:table-cell>
          <table:table-cell table:style-name="Таблица2.B2" office:value-type="string">
            <text:p text:style-name="P4">Форматирование сумм с пробелами-разделителями</text:p>
          </table:table-cell>
        </table:table-row>
        <table:table-row>
          <table:table-cell table:style-name="Таблица2.A2" office:value-type="string">
            <text:p text:style-name="Table_20_Contents"><text:span text:style-name="T1">get_short_date()</text:span></text:p>
          </table:table-cell>
          <table:table-cell table:style-name="Таблица2.B2" office:value-type="string">
            <text:p text:style-name="Table_20_Contents">Текущая дата <text:span text:style-name="T1">ДД.ММ</text:span> для логов статусов</text:p>
          </table:table-cell>
        </table:table-row>
        <table:table-row>
          <table:table-cell table:style-name="Таблица2.A2" office:value-type="string">
            <text:p text:style-name="Table_20_Contents"><text:span text:style-name="T1">update_config_months()</text:span></text:p>
          </table:table-cell>
          <table:table-cell table:style-name="Таблица2.B2" office:value-type="string">
            <text:p text:style-name="Table_20_Contents">Синхронизация <text:span text:style-name="T1">MONTHS_LIST</text:span> в <text:span text:style-name="T1">config.py</text:span> при появлении нового месяца</text:p>
          </table:table-cell>
        </table:table-row>
        <table:table-row>
          <table:table-cell table:style-name="Таблица2.A2" office:value-type="string">
            <text:p text:style-name="Table_20_Contents"><text:span text:style-name="T1">ALL_YEAR_MONTHS</text:span></text:p>
          </table:table-cell>
          <table:table-cell table:style-name="Таблица2.B2" office:value-type="string">
            <text:p text:style-name="P4">Календарный порядок месяцев для сортировки</text:p>
          </table:table-cell>
        </table:table-row>
      </table:table>
      <text:p text:style-name="Text_20_body"/>
      <text:p text:style-name="Text_20_body">Wizard-модули <text:span text:style-name="T2">не работают с JSON напрямую</text:span> — только через <text:span text:style-name="T1">db_core</text:span>.</text:p>
      <text:p text:style-name="Horizontal_20_Line"/>
      <text:h text:style-name="Heading_20_2" text:outline-level="2">Файлы с префиксом <text:span text:style-name="T1">wizard_</text:span></text:h>
      <text:h text:style-name="Heading_20_3" text:outline-level="3"><text:span text:style-name="T1">wizard_manager.py</text:span> — главный пульт</text:h>
      <text:p text:style-name="Text_20_body">Содержит цикл главного меню (пункты 0–4):</text:p>
      <text:p text:style-name="P2">def main_menu():<text:line-break/> <text:s text:c="3"/>while True:<text:line-break/> <text:s text:c="7"/>print("\n&gt;&gt;&gt; ГЛАВНЫЙ ПУЛЬТ УПРАВЛЕНИЯ СТРОИТЕЛЬНЫМ ТРЕКЕРОМ &lt;&lt;&lt;")<text:line-break/> <text:s text:c="7"/>print(" 1. Показать текущую структуру базы (Дерево)")<text:line-break/> <text:s text:c="7"/>print(" 2. Добавить новую ветку структуры (Направление / Подобъект / Месяц)")<text:line-break/> <text:s text:c="7"/>print(" 3. Внести изменения в таблицу (Сумма / Переименование / СтрК)")<text:line-break/> <text:s text:c="7"/>print(" 4. Сгенерировать финальный отчет Excel (с отправкой на GitHub)")<text:line-break/> <text:s text:c="7"/>...<text:line-break/> <text:s text:c="7"/>elif choice == "4":<text:line-break/> <text:s text:c="11"/>...<text:line-break/> <text:s text:c="11"/>builder.build_structure(ws)<text:line-break/> <text:s text:c="11"/>wb.save(file_path)<text:line-break/> <text:s text:c="11"/>wizard_git.run_git_sync()</text:p>
      <text:p text:style-name="Text_20_body">Связывает UI, базу, генератор отчётов и Git.</text:p>
      <text:h text:style-name="Heading_20_3" text:outline-level="3"><text:span text:style-name="T1">wizard_menus.py</text:span> — добавление веток (пункт 2)</text:h>
      <text:list text:style-name="L3">
        <text:list-item>
          <text:p text:style-name="P6"><text:span text:style-name="T1">select_hierarchy_target()</text:span> — выбор направления/подобъекта по номерам (защита от опечаток).</text:p>
        </text:list-item>
        <text:list-item>
          <text:p text:style-name="P6"><text:soft-page-break/><text:span text:style-name="T1">menu_add_record()</text:span> — добавляет месяц с <text:span text:style-name="T1">{"sum": 0.0, "status": {"value": "", "date": ""}}</text:span>, вызывает <text:span text:style-name="T1">db_core.save_db()</text:span> и <text:span text:style-name="T1">update_config_months()</text:span>.</text:p>
        </text:list-item>
      </text:list>
      <text:h text:style-name="Heading_20_3" text:outline-level="3" text:is-list-header="true"><text:span text:style-name="T1">wizard_edits.py</text:span> — редактирование (пункт 3)</text:h>
      <text:p text:style-name="Text_20_body">Три подрежима:</text:p>
      <text:list text:style-name="L4">
        <text:list-item>
          <text:p text:style-name="P7">Изменить сумму месяца,</text:p>
        </text:list-item>
        <text:list-item>
          <text:p text:style-name="P7">Переименовать месяц (с возможным объединением бюджетов),</text:p>
        </text:list-item>
        <text:list-item>
          <text:p text:style-name="P7">Изменить статус СтрК (на все документы или на один).</text:p>
        </text:list-item>
      </text:list>
      <text:p text:style-name="Text_20_body">Использует <text:span text:style-name="T1">select_hierarchy_target</text:span> из <text:span text:style-name="T1">wizard_menus</text:span> и после каждого изменения вызывает <text:span text:style-name="T1">wizard_git.register_action()</text:span> для учёта сессии.</text:p>
      <text:h text:style-name="Heading_20_3" text:outline-level="3"><text:span text:style-name="T1">wizard_git.py</text:span> — деплой после генерации</text:h>
      <text:list text:style-name="L5">
        <text:list-item>
          <text:p text:style-name="P8"><text:span text:style-name="T1">register_action("sum_changed" | "status_changed" | "branch_added")</text:span> — фиксирует тип изменений в сессии.</text:p>
        </text:list-item>
        <text:list-item>
          <text:p text:style-name="P8"><text:span text:style-name="T1">run_git_sync()</text:span> — предлагает новую версию (patch/minor bump), обновляет <text:span text:style-name="T1">VERSION</text:span> в <text:span text:style-name="T1">config.py</text:span>, делает <text:span text:style-name="T1">git add/commit/push</text:span>.</text:p>
        </text:list-item>
      </text:list>
      <text:p text:style-name="Text_20_body">Вызывается после сохранения Excel (пункт 4) и при добавлении веток (пункт 2).</text:p>
      <text:p text:style-name="Horizontal_20_Line"/>
      <text:h text:style-name="Heading_20_2" text:outline-level="2">Связь wizard → база → отчёт</text:h>
      <text:p text:style-name="P2">sequenceDiagram<text:line-break/> <text:s text:c="3"/>participant User<text:line-break/> <text:s text:c="3"/>participant Wizard as wizard_*<text:line-break/> <text:s text:c="3"/>participant Core as db_core<text:line-break/> <text:s text:c="3"/>participant DB as database.json<text:line-break/> <text:s text:c="3"/>participant Builder as builder.py<text:line-break/> <text:s text:c="3"/>participant Excel as .xlsx<text:line-break/><text:line-break/> <text:s text:c="3"/>User-&gt;&gt;Wizard: Пункт 2/3 (изменения)<text:line-break/> <text:s text:c="3"/>Wizard-&gt;&gt;Core: load_db()<text:line-break/> <text:s text:c="3"/>Core-&gt;&gt;DB: read<text:line-break/> <text:s text:c="3"/>Wizard-&gt;&gt;Core: save_db()<text:line-break/> <text:s text:c="3"/>Core-&gt;&gt;DB: write<text:line-break/><text:line-break/> <text:s text:c="3"/>User-&gt;&gt;Wizard: Пункт 4 (генерация)<text:line-break/> <text:s text:c="3"/>Wizard-&gt;&gt;Builder: build_structure(ws)<text:line-break/> <text:s text:c="3"/>Builder-&gt;&gt;DB: json.load (напрямую)<text:line-break/> <text:s text:c="3"/>Builder-&gt;&gt;Core: ALL_YEAR_MONTHS (сортировка)<text:line-break/> <text:s text:c="3"/>Builder-&gt;&gt;Excel: save<text:line-break/> <text:s text:c="3"/>Wizard-&gt;&gt;Wizard: wizard_git.run_git_sync()</text:p>
      <text:p text:style-name="Text_20_body"><text:span text:style-name="T2">Запись данных:</text:span> только <text:span text:style-name="T1">wizard_menus</text:span> и <text:span text:style-name="T1">wizard_edits</text:span> через <text:span text:style-name="T1">db_core</text:span>.</text:p>
      <text:p text:style-name="Text_20_body"><text:span text:style-name="T2">Чтение для отчёта:</text:span> <text:span text:style-name="T1">builder.py</text:span> читает <text:span text:style-name="T1">database.json</text:span> напрямую (<text:span text:style-name="T1">json.load</text:span>), но использует <text:span text:style-name="T1">db_core.ALL_YEAR_MONTHS</text:span> для хронологической сортировки и <text:span text:style-name="T1">config.py</text:span> для документов, масок и стилей.</text:p>
      <text:p text:style-name="Text_20_body"><text:soft-page-break/><text:span text:style-name="T2">Что попадает в Excel из JSON:</text:span></text:p>
      <text:list text:style-name="L6">
        <text:list-item>
          <text:p text:style-name="P9">уровень 0 — направление,</text:p>
        </text:list-item>
        <text:list-item>
          <text:p text:style-name="P9">уровень 1 — подобъект,</text:p>
        </text:list-item>
        <text:list-item>
          <text:p text:style-name="P9">уровень 2 — месяц + сумма + сквозной №,</text:p>
        </text:list-item>
        <text:list-item>
          <text:p text:style-name="P9">уровень 3 — строки документов (<text:span text:style-name="T1">config.DOCUMENTS_LIST</text:span>) со статусами СтрК,</text:p>
        </text:list-item>
        <text:list-item>
          <text:p text:style-name="P9">уровень 4 — строка <text:span text:style-name="T1">└─ Дата изменения СтрК: ДД.ММ</text:span>,</text:p>
        </text:list-item>
        <text:list-item>
          <text:p text:style-name="P9">заблокированные колонки (по <text:span text:style-name="T1">DOCUMENT_ROLES</text:span>) — серая заливка <text:span text:style-name="T1">#EAEAEA</text:span>.</text:p>
        </text:list-item>
      </text:list>
      <text:p text:style-name="Horizontal_20_Line"/>
      <text:h text:style-name="Heading_20_2" text:outline-level="2">Дополнительно: два пути генерации</text:h>
      <table:table table:name="Таблица3" table:style-name="Таблица3">
        <table:table-column table:style-name="Таблица3.A" table:number-columns-repeated="3"/>
        <table:table-header-rows>
          <table:table-row>
            <table:table-cell table:style-name="Таблица3.A1" office:value-type="string">
              <text:p text:style-name="P3"/>
            </table:table-cell>
            <table:table-cell table:style-name="Таблица3.A1" office:value-type="string">
              <text:p text:style-name="Table_20_Heading"><text:span text:style-name="T3">wizard_manager.py</text:span> (актуальный)</text:p>
            </table:table-cell>
            <table:table-cell table:style-name="Таблица3.C1" office:value-type="string">
              <text:p text:style-name="Table_20_Heading"><text:span text:style-name="T3">main.py</text:span> (legacy)</text:p>
            </table:table-cell>
          </table:table-row>
        </table:table-header-rows>
        <table:table-row>
          <table:table-cell table:style-name="Таблица3.A2" office:value-type="string">
            <text:p text:style-name="P4">Источник данных</text:p>
          </table:table-cell>
          <table:table-cell table:style-name="Таблица3.A2" office:value-type="string">
            <text:p text:style-name="Table_20_Contents"><text:span text:style-name="T1">database.json</text:span></text:p>
          </table:table-cell>
          <table:table-cell table:style-name="Таблица3.C2" office:value-type="string">
            <text:p text:style-name="Table_20_Contents"><text:span text:style-name="T1">config.DATA_ROWS</text:span> + миграция из старого Excel через <text:span text:style-name="T1">storage.py</text:span></text:p>
          </table:table-cell>
        </table:table-row>
        <table:table-row>
          <table:table-cell table:style-name="Таблица3.A2" office:value-type="string">
            <text:p text:style-name="P4">Интерфейс</text:p>
          </table:table-cell>
          <table:table-cell table:style-name="Таблица3.A2" office:value-type="string">
            <text:p text:style-name="P4">Интерактивное меню</text:p>
          </table:table-cell>
          <table:table-cell table:style-name="Таблица3.C2" office:value-type="string">
            <text:p text:style-name="P4">Автозапуск одной командой</text:p>
          </table:table-cell>
        </table:table-row>
        <table:table-row>
          <table:table-cell table:style-name="Таблица3.A2" office:value-type="string">
            <text:p text:style-name="P4">Git</text:p>
          </table:table-cell>
          <table:table-cell table:style-name="Таблица3.A2" office:value-type="string">
            <text:p text:style-name="Table_20_Contents"><text:span text:style-name="T1">wizard_git</text:span></text:p>
          </table:table-cell>
          <table:table-cell table:style-name="Таблица3.C2" office:value-type="string">
            <text:p text:style-name="P4">нет</text:p>
          </table:table-cell>
        </table:table-row>
      </table:table>
      <text:p text:style-name="Text_20_body"/>
      <text:p text:style-name="Text_20_body">Текущая архитектура центрирована на <text:span text:style-name="T3">wizard_manager.py</text:span><text:span text:style-name="T2"> → </text:span><text:span text:style-name="T3">database.json</text:span><text:span text:style-name="T2"> → </text:span><text:span text:style-name="T3">builder.py</text:span>. Файл <text:span text:style-name="T1">main.py</text:span> — более ранний сценарий, когда данные жили в Excel и <text:span text:style-name="T1">config.py</text:span>, до перехода на JSON как единый источник правды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7T10:15:49.989863000</meta:creation-date>
    <dc:date>2026-07-07T10:17:11.822778000</dc:date>
    <meta:editing-duration>PT1M23S</meta:editing-duration>
    <meta:editing-cycles>1</meta:editing-cycles>
    <meta:document-statistic meta:table-count="3" meta:image-count="0" meta:object-count="0" meta:page-count="5" meta:paragraph-count="98" meta:word-count="753" meta:character-count="6347" meta:non-whitespace-character-count="5276"/>
    <meta:generator>LibreOffice/26.2.4.2$MacOSX_X86_64 LibreOffice_project/0229ac93fcf0d7cbc6376066c6f35021cef002dc</meta:generator>
  </office:meta>
</office:document-meta>
</file>